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7098" officeooo:paragraph-rsid="0015709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a8a0" officeooo:paragraph-rsid="0015a8a0" style:font-size-asian="14pt" style:font-size-complex="14pt"/>
    </style:style>
    <style:style style:name="P3" style:family="paragraph" style:parent-style-name="Text_20_body">
      <style:text-properties fo:font-size="14pt" officeooo:rsid="0015a8a0" style:font-size-asian="14pt" style:font-size-complex="14pt"/>
    </style:style>
    <style:style style:name="P4" style:family="paragraph" style:parent-style-name="Text_20_body" style:list-style-name="L1">
      <style:text-properties fo:font-size="14pt" officeooo:rsid="0015a8a0" style:font-size-asian="14pt" style:font-size-complex="14pt"/>
    </style:style>
    <style:style style:name="P5" style:family="paragraph" style:parent-style-name="Heading_20_3">
      <style:text-properties officeooo:rsid="0015a8a0"/>
    </style:style>
    <style:style style:name="P6" style:family="paragraph" style:parent-style-name="Text_20_body" style:list-style-name="L2">
      <style:text-properties fo:font-size="14pt" officeooo:rsid="0015a8a0" style:font-size-asian="14pt" style:font-size-complex="14pt"/>
    </style:style>
    <style:style style:name="P7" style:family="paragraph" style:parent-style-name="Text_20_body" style:list-style-name="L3">
      <style:text-properties fo:font-size="14pt" officeooo:rsid="0015a8a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rsid="00157098" officeooo:paragraph-rsid="0015a8a0"/>
    </style:style>
    <style:style style:name="P9" style:family="paragraph" style:parent-style-name="Text_20_body">
      <style:text-properties fo:font-size="14pt" officeooo:rsid="00157098" style:font-size-asian="14pt" style:font-size-complex="14pt"/>
    </style:style>
    <style:style style:name="P10" style:family="paragraph" style:parent-style-name="Text_20_body" style:list-style-name="L4">
      <style:text-properties fo:font-size="14pt" officeooo:rsid="00157098" style:font-size-asian="14pt" style:font-size-complex="14pt"/>
    </style:style>
    <style:style style:name="P11" style:family="paragraph" style:parent-style-name="Text_20_body" style:list-style-name="L5">
      <style:text-properties fo:font-size="14pt" officeooo:rsid="00157098" style:font-size-asian="14pt" style:font-size-complex="14pt"/>
    </style:style>
    <style:style style:name="P12" style:family="paragraph" style:parent-style-name="Text_20_body" style:list-style-name="L6">
      <style:text-properties fo:font-size="14pt" officeooo:rsid="00157098" style:font-size-asian="14pt" style:font-size-complex="14pt"/>
    </style:style>
    <style:style style:name="P13" style:family="paragraph" style:parent-style-name="Text_20_body" style:list-style-name="L7">
      <style:text-properties fo:font-size="14pt" officeooo:rsid="00157098" style:font-size-asian="14pt" style:font-size-complex="14pt"/>
    </style:style>
    <style:style style:name="P14" style:family="paragraph" style:parent-style-name="Heading_20_3">
      <style:paragraph-properties fo:margin-top="0cm" fo:margin-bottom="0.247cm" style:contextual-spacing="false" fo:line-height="115%"/>
      <style:text-properties officeooo:rsid="00157098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fo:font-size="14pt" fo:font-weight="bold" officeooo:rsid="00157098" style:font-size-asian="14pt" style:font-weight-asian="bold" style:font-size-complex="14pt" style:font-weight-complex="bold"/>
    </style:style>
    <style:style style:name="P16" style:family="paragraph" style:parent-style-name="Text_20_body" style:list-style-name="L8">
      <style:text-properties fo:font-size="14pt" officeooo:rsid="00157098" style:font-size-asian="14pt" style:font-size-complex="14pt"/>
    </style:style>
    <style:style style:name="P17" style:family="paragraph" style:parent-style-name="Heading_20_4">
      <style:paragraph-properties fo:margin-top="0cm" fo:margin-bottom="0.247cm" style:contextual-spacing="false" fo:line-height="115%"/>
      <style:text-properties fo:font-size="14pt" fo:font-weight="normal" officeooo:rsid="00157098" style:font-size-asian="14pt" style:font-weight-asian="normal" style:font-size-complex="14pt" style:font-weight-complex="normal"/>
    </style:style>
    <style:style style:name="P18" style:family="paragraph" style:parent-style-name="Text_20_body" style:list-style-name="L9">
      <style:text-properties fo:font-size="14pt" officeooo:rsid="00157098" style:font-size-asian="14pt" style:font-size-complex="14pt"/>
    </style:style>
    <style:style style:name="P19" style:family="paragraph" style:parent-style-name="Text_20_body" style:list-style-name="L10">
      <style:text-properties fo:font-size="14pt" officeooo:rsid="00157098" style:font-size-asian="14pt" style:font-size-complex="14pt"/>
    </style:style>
    <style:style style:name="P20" style:family="paragraph" style:parent-style-name="Text_20_body" style:list-style-name="L11">
      <style:text-properties fo:font-size="14pt" officeooo:rsid="00157098" style:font-size-asian="14pt" style:font-size-complex="14pt"/>
    </style:style>
    <style:style style:name="P21" style:family="paragraph" style:parent-style-name="Text_20_body" style:list-style-name="L12">
      <style:text-properties fo:font-size="14pt" officeooo:rsid="00157098" style:font-size-asian="14pt" style:font-size-complex="14pt"/>
    </style:style>
    <style:style style:name="P22" style:family="paragraph" style:parent-style-name="Text_20_body" style:list-style-name="L13">
      <style:text-properties fo:font-size="14pt" officeooo:rsid="00157098" style:font-size-asian="14pt" style:font-size-complex="14pt"/>
    </style:style>
    <style:style style:name="P23" style:family="paragraph" style:parent-style-name="Text_20_body">
      <style:paragraph-properties fo:margin-top="0cm" fo:margin-bottom="0.247cm" style:contextual-spacing="false" fo:line-height="115%"/>
    </style:style>
    <style:style style:name="P24" style:family="paragraph" style:parent-style-name="Text_20_body">
      <style:text-properties fo:font-size="14pt" style:font-size-asian="14pt" style:font-size-complex="14pt"/>
    </style:style>
    <style:style style:name="P25" style:family="paragraph" style:parent-style-name="Heading_20_2">
      <style:paragraph-properties fo:margin-top="0cm" fo:margin-bottom="0.247cm" style:contextual-spacing="false" fo:line-height="115%"/>
      <style:text-properties fo:font-weight="normal" style:font-weight-asian="normal" style:font-weight-complex="normal"/>
    </style:style>
    <style:style style:name="P26" style:family="paragraph" style:parent-style-name="Text_20_body" style:list-style-name="L14">
      <style:text-properties fo:font-size="14pt" style:font-size-asian="14pt" style:font-size-complex="14pt"/>
    </style:style>
    <style:style style:name="P27" style:family="paragraph" style:parent-style-name="Text_20_body" style:list-style-name="L15">
      <style:text-properties fo:font-size="14pt" style:font-size-asian="14pt" style:font-size-complex="14pt"/>
    </style:style>
    <style:style style:name="P28" style:family="paragraph" style:parent-style-name="Text_20_body" style:list-style-name="L16">
      <style:text-properties fo:font-size="14pt" style:font-size-asian="14pt" style:font-size-complex="14pt"/>
    </style:style>
    <style:style style:name="P29" style:family="paragraph" style:parent-style-name="Text_20_body" style:list-style-name="L17">
      <style:text-properties fo:font-size="14pt" style:font-size-asian="14pt" style:font-size-complex="14pt"/>
    </style:style>
    <style:style style:name="P30" style:family="paragraph" style:parent-style-name="Text_20_body">
      <style:paragraph-properties fo:margin-top="0cm" fo:margin-bottom="0.247cm" style:contextual-spacing="false" fo:line-height="115%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officeooo:rsid="00157098" officeooo:paragraph-rsid="0015709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8739b"/>
    </style:style>
    <style:style style:name="T3" style:family="text">
      <style:text-properties fo:font-size="14pt" fo:font-weight="normal" officeooo:rsid="00157098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zienda scelta: Beretta Holding S.A.</text:span><text:line-break/><text:span text:style-name="Strong_20_Emphasis">Modello organizzativo adottato: Struttura a Matrice</text:span> <text:line-break/></text:p>
      <text:p text:style-name="P2">Macrostruttura<text:line-break/>La macrostruttura scelta è la <text:span text:style-name="Strong_20_Emphasis">STRUTTURA A MATRICE</text:span>.</text:p>
      <text:p text:style-name="P3">Per Beretta Holding significa che l’azienda è organizzata in due modi contemporaneamente:</text:p>
      <text:list text:style-name="L1">
        <text:list-item>
          <text:p text:style-name="P4"><text:span text:style-name="Strong_20_Emphasis">per funzioni</text:span> (gli uffici che fanno attività utili a tutta l’azienda)</text:p>
        </text:list-item>
        <text:list-item>
          <text:p text:style-name="P4"><text:span text:style-name="Strong_20_Emphasis">per divisioni di prodotto</text:span> (i vari settori che producono cose diverse)</text:p>
        </text:list-item>
      </text:list>
      <text:h text:style-name="P5" text:outline-level="3"><text:span text:style-name="Strong_20_Emphasis">Funzioni principali</text:span></text:h>
      <text:list text:style-name="L2">
        <text:list-item>
          <text:p text:style-name="P6">Direzione Generale</text:p>
        </text:list-item>
        <text:list-item>
          <text:p text:style-name="P6">Risorse Umane</text:p>
        </text:list-item>
        <text:list-item>
          <text:p text:style-name="P6">Acquisti</text:p>
        </text:list-item>
        <text:list-item>
          <text:p text:style-name="P6">Produzione / Operations</text:p>
        </text:list-item>
        <text:list-item>
          <text:p text:style-name="P6">Engineering (progettazione e ricerca)</text:p>
        </text:list-item>
        <text:list-item>
          <text:p text:style-name="P6">Qualità</text:p>
        </text:list-item>
        <text:list-item>
          <text:p text:style-name="P6">Marketing e Vendite</text:p>
        </text:list-item>
        <text:list-item>
          <text:p text:style-name="P6">Finanza e Controllo di Gestione</text:p>
        </text:list-item>
        <text:list-item>
          <text:p text:style-name="P6">Supply Chain / Logistica</text:p>
        </text:list-item>
        <text:list-item>
          <text:p text:style-name="P6">ICT / Digitalizzazione</text:p>
        </text:list-item>
        <text:list-item>
          <text:p text:style-name="P6">Sostenibilità / Compliance</text:p>
        </text:list-item>
      </text:list>
      <text:h text:style-name="P5" text:outline-level="3"><text:span text:style-name="Strong_20_Emphasis">Divisioni di prodotto</text:span></text:h>
      <text:list text:style-name="L3">
        <text:list-item>
          <text:p text:style-name="P7">Armi leggere (Beretta, Benelli, Franchi…)</text:p>
        </text:list-item>
        <text:list-item>
          <text:p text:style-name="P7">Munizioni (RUAG Ammotec, RWS…)</text:p>
        </text:list-item>
        <text:list-item>
          <text:p text:style-name="P7">Ottiche (Steiner, Burris)</text:p>
        </text:list-item>
        <text:list-item>
          <text:p text:style-name="P7">Abbigliamento &amp; Outdoor</text:p>
        </text:list-item>
        <text:list-item>
          <text:p text:style-name="P7">Difesa / Law Enforcement</text:p>
        </text:list-item>
        <text:list-item>
          <text:p text:style-name="P7">Innovazione (Innovation Hub)</text:p>
        </text:list-item>
      </text:list>
      <text:p text:style-name="P8"><text:span text:style-name="T1"><text:line-break/><text:line-break/><text:line-break/></text:span><text:soft-page-break/><text:span text:style-name="T1"><text:line-break/><text:line-break/>Microstruttura<text:line-break/></text:span><text:span text:style-name="Strong_20_Emphasis">Funzioni</text:span></text:p>
      <text:p text:style-name="P9"><text:span text:style-name="Strong_20_Emphasis">Team Risorse Umane (HR)</text:span></text:p>
      <text:list text:style-name="L4">
        <text:list-item>
          <text:p text:style-name="P10">1 HR Manager</text:p>
        </text:list-item>
        <text:list-item>
          <text:p text:style-name="P10">2 HR Specialist<text:line-break/><text:span text:style-name="Strong_20_Emphasis">Responsabilità:</text:span> selezione personale, formazione, contratti.</text:p>
        </text:list-item>
      </text:list>
      <text:p text:style-name="P9"><text:span text:style-name="Strong_20_Emphasis">Team Engineering</text:span></text:p>
      <text:list text:style-name="L5">
        <text:list-item>
          <text:p text:style-name="P11">1 Chief Engineer</text:p>
        </text:list-item>
        <text:list-item>
          <text:p text:style-name="P11">3 ingegneri di progettazione</text:p>
        </text:list-item>
        <text:list-item>
          <text:p text:style-name="P11">1 tecnico laboratorio<text:line-break/><text:span text:style-name="Strong_20_Emphasis">Responsabilità:</text:span> progettazione nuovi prodotti, prototipi.</text:p>
        </text:list-item>
      </text:list>
      <text:p text:style-name="P9"><text:span text:style-name="Strong_20_Emphasis">Team Qualità</text:span></text:p>
      <text:list text:style-name="L6">
        <text:list-item>
          <text:p text:style-name="P12">1 responsabile CQ</text:p>
        </text:list-item>
        <text:list-item>
          <text:p text:style-name="P12">3 ispettori qualità<text:line-break/><text:span text:style-name="Strong_20_Emphasis">Responsabilità:</text:span> controllo materiali, test armi/munizioni/ottiche.</text:p>
        </text:list-item>
      </text:list>
      <text:p text:style-name="P9"><text:span text:style-name="Strong_20_Emphasis">Team Finanza</text:span></text:p>
      <text:list text:style-name="L7">
        <text:list-item>
          <text:p text:style-name="P13">1 controller</text:p>
        </text:list-item>
      </text:list>
      <text:p text:style-name="P9">2 addetti amministrazione<text:line-break/><text:span text:style-name="Strong_20_Emphasis">Responsabilità:</text:span> budget, costi, rendicontazioni.<text:line-break/><text:line-break/><text:span text:style-name="Strong_20_Emphasis">Meccanismi di coordinamento utilizzati</text:span></text:p>
      <text:h text:style-name="P14" text:outline-level="3">Supervisione diretta</text:h>
      <text:p text:style-name="P9"><text:tab/>Ogni team ha un responsabile che controlla il lavoro.</text:p>
      <text:h text:style-name="P14" text:outline-level="3">Standardizzazione dei processi</text:h>
      <text:p text:style-name="P9"><text:tab/>La produzione segue procedure identiche per qualità e sicurezza.<text:line-break/></text:p>
      <text:p text:style-name="P15">P<text:span text:style-name="T2">rocesso Aziendale<text:line-break/><text:tab/></text:span><text:span text:style-name="Strong_20_Emphasis">Attività</text:span></text:p>
      <text:list text:style-name="L8">
        <text:list-item>
          <text:list>
            <text:list-item>
              <text:p text:style-name="P16">Richiesta materiali</text:p>
            </text:list-item>
            <text:list-item>
              <text:p text:style-name="P16">Verifica stock</text:p>
            </text:list-item>
            <text:list-item>
              <text:p text:style-name="P16"><text:soft-page-break/>Ordine al fornitore</text:p>
            </text:list-item>
            <text:list-item>
              <text:p text:style-name="P16">Controllo qualità</text:p>
            </text:list-item>
            <text:list-item>
              <text:p text:style-name="P16">Consegna</text:p>
            </text:list-item>
            <text:list-item>
              <text:p text:style-name="P16">Aggiornamento del sistema</text:p>
            </text:list-item>
          </text:list>
        </text:list-item>
      </text:list>
      <text:h text:style-name="P17" text:outline-level="4" text:is-list-header="true"><text:span text:style-name="Strong_20_Emphasis"><text:tab/>Attori</text:span></text:h>
      <text:list text:style-name="L9">
        <text:list-item>
          <text:list>
            <text:list-item>
              <text:p text:style-name="P18">Reparto produzione</text:p>
            </text:list-item>
            <text:list-item>
              <text:p text:style-name="P18">Magazzino</text:p>
            </text:list-item>
            <text:list-item>
              <text:p text:style-name="P18">Ufficio acquisti</text:p>
            </text:list-item>
            <text:list-item>
              <text:p text:style-name="P18">Fornitori</text:p>
            </text:list-item>
            <text:list-item>
              <text:p text:style-name="P18">Qualità</text:p>
            </text:list-item>
          </text:list>
        </text:list-item>
      </text:list>
      <text:h text:style-name="P17" text:outline-level="4" text:is-list-header="true"><text:span text:style-name="Strong_20_Emphasis"><text:tab/>Input</text:span></text:h>
      <text:list text:style-name="L10">
        <text:list-item>
          <text:list>
            <text:list-item>
              <text:p text:style-name="P19">Distinta base</text:p>
            </text:list-item>
            <text:list-item>
              <text:p text:style-name="P19">Giacenze ERP</text:p>
            </text:list-item>
            <text:list-item>
              <text:p text:style-name="P19">Specifiche tecniche</text:p>
            </text:list-item>
          </text:list>
        </text:list-item>
      </text:list>
      <text:h text:style-name="P17" text:outline-level="4" text:is-list-header="true"><text:span text:style-name="Strong_20_Emphasis"><text:tab/>Output</text:span></text:h>
      <text:list text:style-name="L11">
        <text:list-item>
          <text:list>
            <text:list-item>
              <text:p text:style-name="P20">Materiali consegnati</text:p>
            </text:list-item>
            <text:list-item>
              <text:p text:style-name="P20">Ordine generato</text:p>
            </text:list-item>
            <text:list-item>
              <text:p text:style-name="P20">Stock aggiornato</text:p>
            </text:list-item>
          </text:list>
        </text:list-item>
      </text:list>
      <text:h text:style-name="P17" text:outline-level="4" text:is-list-header="true"><text:span text:style-name="Strong_20_Emphasis"><text:tab/>Strumenti IT</text:span></text:h>
      <text:list text:style-name="L12">
        <text:list-item>
          <text:list>
            <text:list-item>
              <text:p text:style-name="P21">ERP aziendale</text:p>
            </text:list-item>
            <text:list-item>
              <text:p text:style-name="P21">Database fornitori</text:p>
            </text:list-item>
            <text:list-item>
              <text:p text:style-name="P21">Sistema qualità</text:p>
            </text:list-item>
          </text:list>
        </text:list-item>
      </text:list>
      <text:h text:style-name="P17" text:outline-level="4" text:is-list-header="true"><text:span text:style-name="Strong_20_Emphasis"><text:tab/>Rischi digitali</text:span></text:h>
      <text:list text:style-name="L13">
        <text:list-item>
          <text:list>
            <text:list-item>
              <text:p text:style-name="P22">Errori di sincronizzazione ERP</text:p>
            </text:list-item>
            <text:list-item>
              <text:p text:style-name="P22">Dati di magazzino non aggiornati</text:p>
            </text:list-item>
            <text:list-item>
              <text:p text:style-name="P22">Ritardi nella comunicazione con i fornitori</text:p>
            </text:list-item>
            <text:list-item>
              <text:p text:style-name="P22">Possibili attacchi informatici</text:p>
            </text:list-item>
          </text:list>
        </text:list-item>
      </text:list>
      <text:p text:style-name="P23"><text:soft-page-break/><text:span text:style-name="T3"><text:line-break/></text:span><text:span text:style-name="T4">MINI REPORT FINALE <text:line-break/></text:span><text:span text:style-name="T5"><text:tab/></text:span><text:span text:style-name="Strong_20_Emphasis"><text:span text:style-name="T1">Perché è stata scelta la struttura a matrice</text:span></text:span></text:p>
      <text:p text:style-name="P24">Perché Beretta Holding gestisce molti prodotti diversi ma deve mantenere funzioni centrali comuni. La matrice permette coordinamento tra produzione, qualità, ingegneria e le diverse divisioni (armi, munizioni, ottiche).</text:p>
      <text:h text:style-name="P25" text:outline-level="2"><text:span text:style-name="Strong_20_Emphasis"><text:span text:style-name="T1">Vantaggi</text:span></text:span></text:h>
      <text:list text:style-name="L14">
        <text:list-item>
          <text:p text:style-name="P26">Maggiore flessibilità</text:p>
        </text:list-item>
        <text:list-item>
          <text:p text:style-name="P26">Miglior coordinamento tra uffici e divisioni</text:p>
        </text:list-item>
        <text:list-item>
          <text:p text:style-name="P26">Condivisione delle competenze</text:p>
        </text:list-item>
        <text:list-item>
          <text:p text:style-name="P26">Innovazione più rapida</text:p>
        </text:list-item>
      </text:list>
      <text:h text:style-name="P25" text:outline-level="2"><text:span text:style-name="Strong_20_Emphasis"><text:span text:style-name="T1">Svantaggi</text:span></text:span></text:h>
      <text:list text:style-name="L15">
        <text:list-item>
          <text:p text:style-name="P27">Possibili conflitti tra capi funzione e capi divisione</text:p>
        </text:list-item>
        <text:list-item>
          <text:p text:style-name="P27">Comunicazione complessa</text:p>
        </text:list-item>
        <text:list-item>
          <text:p text:style-name="P27">Necessità di molte riunioni di coordinamento</text:p>
        </text:list-item>
      </text:list>
      <text:h text:style-name="P25" text:outline-level="2"><text:span text:style-name="Strong_20_Emphasis"><text:span text:style-name="T1">Ruolo dei sistemi IT</text:span></text:span></text:h>
      <text:list text:style-name="L16">
        <text:list-item>
          <text:p text:style-name="P28">L’ERP aggiorna magazzino, ordini e costi</text:p>
        </text:list-item>
        <text:list-item>
          <text:p text:style-name="P28">I sistemi qualità registrano i controlli</text:p>
        </text:list-item>
        <text:list-item>
          <text:p text:style-name="P28">Il CRM gestisce vendite e clienti</text:p>
        </text:list-item>
        <text:list-item>
          <text:p text:style-name="P28">Le piattaforme collaborative permettono comunicazione rapida</text:p>
        </text:list-item>
      </text:list>
      <text:h text:style-name="P25" text:outline-level="2"><text:span text:style-name="Strong_20_Emphasis"><text:span text:style-name="T1">Miglioramenti digitali</text:span></text:span></text:h>
      <text:list text:style-name="L17">
        <text:list-item>
          <text:p text:style-name="P29">Automazione dei controlli stock</text:p>
        </text:list-item>
        <text:list-item>
          <text:p text:style-name="P29">Dashboard in tempo reale</text:p>
        </text:list-item>
        <text:list-item>
          <text:p text:style-name="P29">Integrazione totale tra ERP e sistemi dei fornitori</text:p>
        </text:list-item>
        <text:list-item>
          <text:p text:style-name="P29">AI per previsione fabbisogni e produzione</text:p>
        </text:list-item>
      </text:list>
      <text:p text:style-name="P30"/>
      <text:p text:style-name="P9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8:57:42.436797500</meta:creation-date>
    <dc:date>2025-11-21T09:19:48.701150800</dc:date>
    <meta:editing-duration>PT22M5S</meta:editing-duration>
    <meta:editing-cycles>4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93" meta:word-count="452" meta:character-count="2998" meta:non-whitespace-character-count="2685"/>
  </office:meta>
</office:document-meta>
</file>